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943" officeooo:paragraph-rsid="00098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9:22:20.062967811</meta:creation-date>
    <dc:date>2026-06-18T19:23:00.110949384</dc:date>
    <meta:editing-duration>PT40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7.2$Linux_X86_64 LibreOffice_project/30$Build-2</meta:generator>
  </office:meta>
</office:document-meta>
</file>